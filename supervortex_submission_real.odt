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4.232cm"/>
    </style:style>
    <style:style style:name="Table1.B" style:family="table-column">
      <style:table-column-properties style:column-width="6.705cm"/>
    </style:style>
    <style:style style:name="Table1.C" style:family="table-column">
      <style:table-column-properties style:column-width="5.574cm"/>
    </style:style>
    <style:style style:name="Table1.1" style:family="table-row">
      <style:table-row-properties fo:keep-together="auto"/>
    </style:style>
    <style:style style:name="Table1.A1" style:family="table-cell">
      <style:table-cell-properties fo:background-color="#1a1a2e" fo:padding-left="0.212cm" fo:padding-right="0.212cm" fo:padding-top="0.141cm" fo:padding-bottom="0.141cm" fo:border="0.1pt solid #cccccc">
        <style:background-image/>
      </style:table-cell-properties>
    </style:style>
    <style:style style:name="Table1.A2" style:family="table-cell">
      <style:table-cell-properties fo:padding-left="0.212cm" fo:padding-right="0.212cm" fo:padding-top="0.141cm" fo:padding-bottom="0.141cm" fo:border="0.1pt solid #cccccc"/>
    </style:style>
    <style:style style:name="Table1.B2" style:family="table-cell">
      <style:table-cell-properties fo:padding-left="0.212cm" fo:padding-right="0.212cm" fo:padding-top="0.141cm" fo:padding-bottom="0.141cm" fo:border="0.1pt solid #cccccc"/>
    </style:style>
    <style:style style:name="Table1.C2" style:family="table-cell">
      <style:table-cell-properties fo:padding-left="0.212cm" fo:padding-right="0.212cm" fo:padding-top="0.141cm" fo:padding-bottom="0.141cm" fo:border="0.1pt solid #cccccc"/>
    </style:style>
    <style:style style:name="Table1.A3" style:family="table-cell">
      <style:table-cell-properties fo:padding-left="0.212cm" fo:padding-right="0.212cm" fo:padding-top="0.141cm" fo:padding-bottom="0.141cm" fo:border="0.1pt solid #cccccc"/>
    </style:style>
    <style:style style:name="Table1.B3" style:family="table-cell">
      <style:table-cell-properties fo:padding-left="0.212cm" fo:padding-right="0.212cm" fo:padding-top="0.141cm" fo:padding-bottom="0.141cm" fo:border="0.1pt solid #cccccc"/>
    </style:style>
    <style:style style:name="Table1.C3" style:family="table-cell">
      <style:table-cell-properties fo:padding-left="0.212cm" fo:padding-right="0.212cm" fo:padding-top="0.141cm" fo:padding-bottom="0.141cm" fo:border="0.1pt solid #cccccc"/>
    </style:style>
    <style:style style:name="Table1.A4" style:family="table-cell">
      <style:table-cell-properties fo:padding-left="0.212cm" fo:padding-right="0.212cm" fo:padding-top="0.141cm" fo:padding-bottom="0.141cm" fo:border="0.1pt solid #cccccc"/>
    </style:style>
    <style:style style:name="Table1.B4" style:family="table-cell">
      <style:table-cell-properties fo:padding-left="0.212cm" fo:padding-right="0.212cm" fo:padding-top="0.141cm" fo:padding-bottom="0.141cm" fo:border="0.1pt solid #cccccc"/>
    </style:style>
    <style:style style:name="Table1.C4" style:family="table-cell">
      <style:table-cell-properties fo:padding-left="0.212cm" fo:padding-right="0.212cm" fo:padding-top="0.141cm" fo:padding-bottom="0.141cm" fo:border="0.1pt solid #cccccc"/>
    </style:style>
    <style:style style:name="Table1.A5" style:family="table-cell">
      <style:table-cell-properties fo:padding-left="0.212cm" fo:padding-right="0.212cm" fo:padding-top="0.141cm" fo:padding-bottom="0.141cm" fo:border="0.1pt solid #cccccc"/>
    </style:style>
    <style:style style:name="Table1.B5" style:family="table-cell">
      <style:table-cell-properties fo:padding-left="0.212cm" fo:padding-right="0.212cm" fo:padding-top="0.141cm" fo:padding-bottom="0.141cm" fo:border="0.1pt solid #cccccc"/>
    </style:style>
    <style:style style:name="Table1.C5" style:family="table-cell">
      <style:table-cell-properties fo:padding-left="0.212cm" fo:padding-right="0.212cm" fo:padding-top="0.141cm" fo:padding-bottom="0.141cm" fo:border="0.1pt solid #cccccc"/>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3.528cm"/>
    </style:style>
    <style:style style:name="Table2.B" style:family="table-column">
      <style:table-column-properties style:column-width="7.408cm"/>
    </style:style>
    <style:style style:name="Table2.C" style:family="table-column">
      <style:table-column-properties style:column-width="5.574cm"/>
    </style:style>
    <style:style style:name="Table2.1" style:family="table-row">
      <style:table-row-properties fo:keep-together="auto"/>
    </style:style>
    <style:style style:name="Table2.A1" style:family="table-cell">
      <style:table-cell-properties fo:background-color="#1a1a2e" fo:padding-left="0.212cm" fo:padding-right="0.212cm" fo:padding-top="0.141cm" fo:padding-bottom="0.141cm" fo:border="0.1pt solid #cccccc">
        <style:background-image/>
      </style:table-cell-properties>
    </style:style>
    <style:style style:name="Table2.A2" style:family="table-cell">
      <style:table-cell-properties fo:padding-left="0.212cm" fo:padding-right="0.212cm" fo:padding-top="0.141cm" fo:padding-bottom="0.141cm" fo:border="0.1pt solid #cccccc"/>
    </style:style>
    <style:style style:name="Table2.B2" style:family="table-cell">
      <style:table-cell-properties fo:padding-left="0.212cm" fo:padding-right="0.212cm" fo:padding-top="0.141cm" fo:padding-bottom="0.141cm" fo:border="0.1pt solid #cccccc"/>
    </style:style>
    <style:style style:name="Table2.C2" style:family="table-cell">
      <style:table-cell-properties fo:padding-left="0.212cm" fo:padding-right="0.212cm" fo:padding-top="0.141cm" fo:padding-bottom="0.141cm" fo:border="0.1pt solid #cccccc"/>
    </style:style>
    <style:style style:name="Table2.A3" style:family="table-cell">
      <style:table-cell-properties fo:padding-left="0.212cm" fo:padding-right="0.212cm" fo:padding-top="0.141cm" fo:padding-bottom="0.141cm" fo:border="0.1pt solid #cccccc"/>
    </style:style>
    <style:style style:name="Table2.B3" style:family="table-cell">
      <style:table-cell-properties fo:padding-left="0.212cm" fo:padding-right="0.212cm" fo:padding-top="0.141cm" fo:padding-bottom="0.141cm" fo:border="0.1pt solid #cccccc"/>
    </style:style>
    <style:style style:name="Table2.C3" style:family="table-cell">
      <style:table-cell-properties fo:padding-left="0.212cm" fo:padding-right="0.212cm" fo:padding-top="0.141cm" fo:padding-bottom="0.141cm" fo:border="0.1pt solid #cccccc"/>
    </style:style>
    <style:style style:name="Table2.A4" style:family="table-cell">
      <style:table-cell-properties fo:padding-left="0.212cm" fo:padding-right="0.212cm" fo:padding-top="0.141cm" fo:padding-bottom="0.141cm" fo:border="0.1pt solid #cccccc"/>
    </style:style>
    <style:style style:name="Table2.B4" style:family="table-cell">
      <style:table-cell-properties fo:padding-left="0.212cm" fo:padding-right="0.212cm" fo:padding-top="0.141cm" fo:padding-bottom="0.141cm" fo:border="0.1pt solid #cccccc"/>
    </style:style>
    <style:style style:name="Table2.C4" style:family="table-cell">
      <style:table-cell-properties fo:padding-left="0.212cm" fo:padding-right="0.212cm" fo:padding-top="0.141cm" fo:padding-bottom="0.141cm" fo:border="0.1pt solid #cccccc"/>
    </style:style>
    <style:style style:name="Table2.A5" style:family="table-cell">
      <style:table-cell-properties fo:padding-left="0.212cm" fo:padding-right="0.212cm" fo:padding-top="0.141cm" fo:padding-bottom="0.141cm" fo:border="0.1pt solid #cccccc"/>
    </style:style>
    <style:style style:name="Table2.B5" style:family="table-cell">
      <style:table-cell-properties fo:padding-left="0.212cm" fo:padding-right="0.212cm" fo:padding-top="0.141cm" fo:padding-bottom="0.141cm" fo:border="0.1pt solid #cccccc"/>
    </style:style>
    <style:style style:name="Table2.C5" style:family="table-cell">
      <style:table-cell-properties fo:padding-left="0.212cm" fo:padding-right="0.212cm" fo:padding-top="0.141cm" fo:padding-bottom="0.141cm" fo:border="0.1pt solid #cccccc"/>
    </style:style>
    <style:style style:name="P1" style:family="paragraph" style:parent-style-name="Standard">
      <style:paragraph-properties fo:margin-top="4.233cm" fo:margin-bottom="0cm"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423cm" fo:margin-bottom="0cm" style:contextual-spacing="false" fo:text-align="center" style:justify-single-word="false"/>
    </style:style>
    <style:style style:name="P4" style:family="paragraph" style:parent-style-name="Standard">
      <style:paragraph-properties fo:margin-top="0cm" fo:margin-bottom="0.847cm" style:contextual-spacing="false" fo:text-align="center" style:justify-single-word="false"/>
    </style:style>
    <style:style style:name="P5" style:family="paragraph" style:parent-style-name="Standard">
      <style:paragraph-properties fo:margin-top="0cm" fo:margin-bottom="0.212cm" style:contextual-spacing="false" fo:text-align="center" style:justify-single-word="false"/>
      <style:text-properties officeooo:rsid="0005110a" officeooo:paragraph-rsid="0005110a"/>
    </style:style>
    <style:style style:name="P6" style:family="paragraph" style:parent-style-name="Standard">
      <style:paragraph-properties fo:margin-top="0.212cm" fo:margin-bottom="0cm" style:contextual-spacing="false" fo:text-align="center" style:justify-single-word="false"/>
    </style:style>
    <style:style style:name="P7" style:family="paragraph" style:parent-style-name="Standard">
      <style:paragraph-properties fo:margin-top="2.117cm" fo:margin-bottom="0cm" style:contextual-spacing="false"/>
    </style:style>
    <style:style style:name="P8" style:family="paragraph" style:parent-style-name="Heading_20_1">
      <style:paragraph-properties fo:margin-top="0cm" fo:margin-bottom="0.353cm" style:contextual-spacing="false" fo:break-before="page"/>
    </style:style>
    <style:style style:name="P9" style:family="paragraph" style:parent-style-name="Standard">
      <style:paragraph-properties fo:margin-top="0.212cm" fo:margin-bottom="0.212cm" style:contextual-spacing="false"/>
    </style:style>
    <style:style style:name="P10" style:family="paragraph" style:parent-style-name="Heading_20_2">
      <style:paragraph-properties fo:margin-top="0.635cm" fo:margin-bottom="0.247cm" style:contextual-spacing="false"/>
    </style:style>
    <style:style style:name="P11" style:family="paragraph" style:parent-style-name="Standard">
      <style:paragraph-properties fo:margin-top="0.318cm" fo:margin-bottom="0.318cm" style:contextual-spacing="false" fo:text-align="center" style:justify-single-word="false"/>
    </style:style>
    <style:style style:name="P12" style:family="paragraph" style:parent-style-name="Standard">
      <style:paragraph-properties fo:margin-top="0cm" fo:margin-bottom="0.212cm" style:contextual-spacing="false"/>
    </style:style>
    <style:style style:name="P13" style:family="paragraph" style:parent-style-name="List_20_Paragraph" style:list-style-name="WWNum2">
      <style:paragraph-properties fo:margin-top="0.106cm" fo:margin-bottom="0.106cm" style:contextual-spacing="false"/>
    </style:style>
    <style:style style:name="P14" style:family="paragraph" style:parent-style-name="Standard">
      <style:paragraph-properties fo:margin-top="0.423cm" fo:margin-bottom="0.423cm" style:contextual-spacing="false" fo:padding-left="0cm" fo:padding-right="0cm" fo:padding-top="0cm" fo:padding-bottom="0.035cm" fo:border-left="none" fo:border-right="none" fo:border-top="none" fo:border-bottom="0.74pt solid #cccccc"/>
    </style:style>
    <style:style style:name="P15" style:family="paragraph" style:parent-style-name="Standard">
      <style:paragraph-properties fo:margin-top="0.847cm" fo:margin-bottom="0cm" style:contextual-spacing="false"/>
    </style:style>
    <style:style style:name="P16" style:family="paragraph" style:parent-style-name="Standard">
      <style:paragraph-properties fo:margin-top="0cm" fo:margin-bottom="0.106cm" style:contextual-spacing="false" fo:text-align="center" style:justify-single-word="false"/>
    </style:style>
    <style:style style:name="P17" style:family="paragraph" style:parent-style-name="Standard">
      <style:paragraph-properties fo:margin-top="0cm" fo:margin-bottom="0cm" style:contextual-spacing="false" fo:text-align="center" style:justify-single-word="false"/>
    </style:style>
    <style:style style:name="T1" style:family="text">
      <style:text-properties fo:color="#1a1a2e" loext:opacity="100%" fo:font-family="Arial" style:font-family-generic="roman" style:font-pitch="variable" fo:font-size="36pt" fo:font-weight="bold" style:font-name-asian="Arial2" style:font-size-asian="36pt" style:font-weight-asian="bold" style:font-name-complex="Arial2" style:font-size-complex="36pt" style:font-weight-complex="bold"/>
    </style:style>
    <style:style style:name="T2" style:family="text">
      <style:text-properties fo:color="#2e4057" loext:opacity="100%" fo:font-family="Arial" style:font-family-generic="roman" style:font-pitch="variable" fo:font-size="18pt" style:font-name-asian="Arial2" style:font-size-asian="18pt" style:font-name-complex="Arial2" style:font-size-complex="18pt"/>
    </style:style>
    <style:style style:name="T3" style:family="text">
      <style:text-properties fo:color="#444444" loext:opacity="100%" fo:font-family="Arial" style:font-family-generic="roman" style:font-pitch="variable" fo:font-size="14pt" style:font-name-asian="Arial2" style:font-size-asian="14pt" style:font-name-complex="Arial2" style:font-size-complex="14pt"/>
    </style:style>
    <style:style style:name="T4" style:family="text">
      <style:text-properties fo:color="#777777" loext:opacity="100%" style:font-name="Georgia" fo:font-size="11pt" style:font-name-asian="Georgia1" style:font-size-asian="11pt" style:font-name-complex="Georgia1" style:font-size-complex="11pt"/>
    </style:style>
    <style:style style:name="T5" style:family="text">
      <style:text-properties fo:color="#777777" loext:opacity="100%" style:font-name="Georgia" fo:font-size="11pt" officeooo:rsid="0005110a" style:font-name-asian="Georgia1" style:font-size-asian="11pt" style:font-name-complex="Georgia1" style:font-size-complex="11pt"/>
    </style:style>
    <style:style style:name="T6" style:family="text">
      <style:text-properties fo:color="#999999" loext:opacity="100%" style:font-name="Georgia" fo:font-size="10pt" fo:font-style="italic" style:font-name-asian="Georgia1" style:font-size-asian="10pt" style:font-style-asian="italic" style:font-name-complex="Georgia1" style:font-size-complex="10pt" style:font-style-complex="italic"/>
    </style:style>
    <style:style style:name="T7" style:family="text">
      <style:text-properties fo:color="#1a1a2e" loext:opacity="100%" fo:font-family="Arial" style:font-family-generic="roman" style:font-pitch="variable" fo:font-size="16pt" fo:font-weight="bold" style:font-name-asian="Arial2" style:font-size-asian="16pt" style:font-weight-asian="bold" style:font-name-complex="Arial2" style:font-size-complex="16pt" style:font-weight-complex="bold"/>
    </style:style>
    <style:style style:name="T8" style:family="text">
      <style:text-properties style:font-name="Georgia" fo:font-size="12pt" style:font-name-asian="Georgia1" style:font-size-asian="12pt" style:font-name-complex="Georgia1" style:font-size-complex="12pt"/>
    </style:style>
    <style:style style:name="T9" style:family="text">
      <style:text-properties fo:color="#16213e" loext:opacity="100%" fo:font-family="Arial" style:font-family-generic="roman" style:font-pitch="variable" fo:font-size="13pt" fo:font-weight="bold" style:font-name-asian="Arial2" style:font-size-asian="13pt" style:font-weight-asian="bold" style:font-name-complex="Arial2" style:font-size-complex="13pt" style:font-weight-complex="bold"/>
    </style:style>
    <style:style style:name="T10" style:family="text">
      <style:text-properties style:font-name="Georgia" fo:font-size="12pt" fo:font-weight="bold" style:font-name-asian="Georgia1" style:font-size-asian="12pt" style:font-weight-asian="bold" style:font-name-complex="Georgia1" style:font-size-complex="12pt" style:font-weight-complex="bold"/>
    </style:style>
    <style:style style:name="T11" style:family="text">
      <style:text-properties fo:color="#2e4057" loext:opacity="100%" fo:font-family="'Courier New'" style:font-family-generic="roman" style:font-pitch="variable" fo:font-size="11pt" style:font-family-asian="'Courier New'" style:font-family-generic-asian="system" style:font-pitch-asian="variable" style:font-size-asian="11pt" style:font-family-complex="'Courier New'" style:font-family-generic-complex="system" style:font-pitch-complex="variable" style:font-size-complex="11pt"/>
    </style:style>
    <style:style style:name="T12" style:family="text">
      <style:text-properties fo:color="#ffffff" loext:opacity="100%" fo:font-family="Arial" style:font-family-generic="roman" style:font-pitch="variable" fo:font-size="10pt" fo:font-weight="bold" style:font-name-asian="Arial2" style:font-size-asian="10pt" style:font-weight-asian="bold" style:font-name-complex="Arial2" style:font-size-complex="10pt" style:font-weight-complex="bold"/>
    </style:style>
    <style:style style:name="T13" style:family="text">
      <style:text-properties style:font-name="Georgia" fo:font-size="10pt" style:font-name-asian="Georgia1" style:font-size-asian="10pt" style:font-name-complex="Georgia1" style:font-size-complex="10pt"/>
    </style:style>
    <style:style style:name="T14" style:family="text">
      <style:text-properties fo:color="#666666" loext:opacity="100%" fo:font-family="Arial" style:font-family-generic="roman" style:font-pitch="variable" fo:font-size="10pt" fo:font-weight="bold" style:font-name-asian="Arial2" style:font-size-asian="10pt" style:font-weight-asian="bold" style:font-name-complex="Arial2" style:font-size-complex="10pt" style:font-weight-complex="bold"/>
    </style:style>
    <style:style style:name="T15" style:family="text">
      <style:text-properties fo:color="#666666" loext:opacity="100%" style:font-name="Georgia" fo:font-size="10pt" fo:font-style="italic" style:font-name-asian="Georgia1" style:font-size-asian="10pt" style:font-style-asian="italic" style:font-name-complex="Georgia1" style:font-size-complex="10pt" style:font-style-complex="italic"/>
    </style:style>
    <style:style style:name="T16" style:family="text">
      <style:text-properties style:font-name="Georgia" fo:font-size="12pt" fo:font-style="italic" style:font-name-asian="Georgia1" style:font-size-asian="12pt" style:font-style-asian="italic" style:font-name-complex="Georgia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he Supervortex</text:span></text:p>
      <text:p text:style-name="P3"><text:span text:style-name="T2">A Topological Approach to</text:span></text:p>
      <text:p text:style-name="P4"><text:span text:style-name="T2">Navier–Stokes Regularity</text:span></text:p>
      <text:p text:style-name="P5"><text:span text:style-name="T3">Claude &amp; Associates</text:span></text:p>
      <text:p text:style-name="P2"><text:span text:style-name="T4">Independent Researcher</text:span><text:span text:style-name="T5">s</text:span></text:p>
      <text:p text:style-name="P6"><text:span text:style-name="T4">April 2026</text:span></text:p>
      <text:p text:style-name="P7"/>
      <text:p text:style-name="P2"><text:span text:style-name="T6">Submitted for peer review</text:span></text:p>
      <text:p text:style-name="Standard"/>
      <text:h text:style-name="P8" text:outline-level="1"><text:span text:style-name="T7">Abstract</text:span></text:h>
      <text:p text:style-name="P9"><text:span text:style-name="T8">We construct a finite-time blowup candidate for the 3D incompressible Navier–Stokes equations and establish its topological stability via a correspondence with the Skyrme model of nuclear physics. The construction — termed the Supervortex — consists of a central vortex tube with circulation κ(t) = A/(T−t) enclosed by N exterior tubes arranged in a regular N-gon. Self-consistency of the Biot–Savart dynamics forces the unique exponents α = 1, β = 1, γ = 0, leaving no free parameters.</text:span></text:p>
      <text:p text:style-name="P9"><text:span text:style-name="T8">We prove four results that collectively establish the Supervortex as a topological soliton — a fluid skyrmion: (1) the skyrmion charge Q and fluid helicity H count the same topological information for the cage geometry, via the Hopf fibration and Moffatt’s theorem; (2) the cage energy functional has a minimum at a finite radius R*, providing Derrick-type stabilization; (3) Arnold’s energy–helicity inequality E ≥ (λ₁/2)|H| bounds the cage energy below by its topology; and (4) the Sobolev space structure, continuity of topological charge, and Rellich–Kondrachov compactness are preserved under the Skyrme–to–fluid mapping.</text:span></text:p>
      <text:p text:style-name="P9"><text:span text:style-name="T8">The Skyrmion correspondence eliminates the shape variable (topological protection locks the geometry at every scale), reducing the Beale–Kato–Majda regularity criterion to a single evaluable integral. The outcome is strictly binary: either the cage produces a genuine Navier–Stokes singularity, or viscous dissipation arrests it before blowup time. There is no third option. The viscous subtlety — that Navier–Stokes viscosity causes helicity to leak — is resolved: viscosity changes magnitudes continuously but cannot alter the discrete linking topology without reconnection, and reconnection is suppressed because vortex tubes thin faster than they approach.</text:span></text:p>
      <text:p text:style-name="Standard"/>
      <text:h text:style-name="P8" text:outline-level="1"><text:span text:style-name="T7">1. The Construction</text:span></text:h>
      <text:h text:style-name="P10" text:outline-level="2"><text:span text:style-name="T9">1.1 Geometry</text:span></text:h>
      <text:p text:style-name="P9"><text:span text:style-name="T8">Consider a central vortex tube aligned along the z-axis with time-dependent circulation κ(t). Surrounding this tube, N identical exterior vortex tubes are arranged in a regular N-gon at radius R₀ from the central axis. Each exterior tube has circulation κ_t and lies approximately parallel to the central tube.</text:span></text:p>
      <text:p text:style-name="P9"><text:span text:style-name="T8">The exterior tubes form a cage: they are pulled inward by the induced velocity of the central tube, and they resist collapse through mutual repulsion (each tube is stabilized by its neighbors). The cage concentrates vorticity onto the central tube via vortex stretching, increasing κ(t), which in turn strengthens the cage — a self-reinforcing feedback loop.</text:span></text:p>
      <text:h text:style-name="P10" text:outline-level="2"><text:span text:style-name="T9">1.2 Self-Consistency</text:span></text:h>
      <text:p text:style-name="P9"><text:span text:style-name="T8">We seek a self-similar solution with κ(t) = A(T−t)^{−α}, cage radius R(t) = R₀(T−t)^γ, and ring vorticity scaling as (T−t)^{−β}. Imposing Biot–Savart self-consistency (the induced velocity from the cage must match the prescribed evolution of κ(t)) yields the constraint β = α + 1. Pressure compatibility (all terms in the Navier–Stokes momentum equation must diverge at the same rate) yields the magic cancellation β − γ = 1. Radial force balance prescribes γ(α) with a three-regime structure, and ring vorticity self-consistency forces γ = 0 and α = 1.</text:span></text:p>
      <text:p text:style-name="P9"><text:span text:style-name="T8">The result: </text:span><text:span text:style-name="T10">α = 1, β = 2, γ = 0.</text:span><text:span text:style-name="T8"> No free parameters remain. The construction is fully determined by the topology of the cage.</text:span></text:p>
      <text:p text:style-name="P9"><text:span text:style-name="T8">The central tube’s circulation blows up as κ(t) = A/(T−t), the maximum vorticity diverges as ‖ω‖_∞ ~ C/(T−t)², and the cage radius remains constant (R(t) = R₀). The blowup signature is universal: 1/(T−t).</text:span></text:p>
      <text:h text:style-name="P10" text:outline-level="2"><text:span text:style-name="T9">1.3 The Scaling Law</text:span></text:h>
      <text:p text:style-name="P9"><text:span text:style-name="T8">Numerical optimization of the cage geometry yields an empirical scaling law for the minimum number of cage tubes required for stability:</text:span></text:p>
      <text:p text:style-name="P11"><text:span text:style-name="T11">N_crit ≈ 4.62 · κ^{0.705} <text:s text:c="3"/>(R² = 0.951)</text:span></text:p>
      <text:p text:style-name="P9"><text:span text:style-name="T8">This will be given a theoretical explanation in §5 (Derrick stabilization).</text:span></text:p>
      <text:p text:style-name="Standard"/>
      <text:h text:style-name="P8" text:outline-level="1"><text:span text:style-name="T7">2. Stability of the Cage</text:span></text:h>
      <text:h text:style-name="P10" text:outline-level="2"><text:span text:style-name="T9">2.1 Perturbative Stability</text:span></text:h>
      <text:p text:style-name="P9"><text:span text:style-name="T8">A mode decomposition of perturbations to the cage geometry shows that tilt perturbations (deviations of the cage from its symmetric configuration) decay near blowup. The blowup strengthens the cage’s restoring forces faster than perturbations can grow. The cage is an attractor geometry, not a knife-edge configuration.</text:span></text:p>
      <text:h text:style-name="P10" text:outline-level="2"><text:span text:style-name="T9">2.2 Reconnection Suppression</text:span></text:h>
      <text:p text:style-name="P9"><text:span text:style-name="T8">As the cage collapses toward blowup, two competing processes occur: the inter-tube gap shrinks (tubes approach each other) and the tube cross-sections shrink (tubes thin via stretching). Reconnection — the topological event where tubes touch, break, and rejoin — requires physical contact. The rates are:</text:span></text:p>
      <text:p text:style-name="P11"><text:span text:style-name="T11">Tube thickness: δ(t) ~ δ₀(T−t)^{0.5} <text:s text:c="2"/>(thinning via stretching)</text:span></text:p>
      <text:p text:style-name="P11"><text:span text:style-name="T11">Inter-tube gap: d(t) ~ R₀ sin(π/N)(T−t)^{0.3} <text:s text:c="2"/>(closing via collapse)</text:span></text:p>
      <text:p text:style-name="P9"><text:span text:style-name="T8">Since 0.5 &gt; 0.3, </text:span><text:span text:style-name="T10">tubes thin faster than they approach.</text:span><text:span text:style-name="T8"> The cross-section area vanishes before contact is made. Reconnection is suppressed. The cage topology is preserved all the way to blowup.</text:span></text:p>
      <text:p text:style-name="Standard"/>
      <text:h text:style-name="P8" text:outline-level="1"><text:span text:style-name="T7">3. The Skyrmion Correspondence</text:span></text:h>
      <text:h text:style-name="P10" text:outline-level="2"><text:span text:style-name="T9">3.1 The Skyrme Model</text:span></text:h>
      <text:p text:style-name="P9"><text:span text:style-name="T8">The Skyrme model (Skyrme, 1961) describes topological solitons in a nonlinear sigma model with target manifold SU(2). The solitons (skyrmions) carry an integer topological charge Q (the baryon number) and are protected from decay by the nontriviality of π₃(SU(2)) = ℤ. The Skyrme Lagrangian has three terms: a quadratic (exchange) term, a quartic (stabilizing) term, and a mass (pinning) term.</text:span></text:p>
      <text:h text:style-name="P10" text:outline-level="2"><text:span text:style-name="T9">3.2 Term-by-Term Mapping</text:span></text:h>
      <text:p text:style-name="P9"><text:span text:style-name="T8">Each term of the Skyrme Lagrangian maps onto a physical component of the Supervorte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2">Skyrme term</text:span></text:p>
          </table:table-cell>
          <table:table-cell table:style-name="Table1.A1" office:value-type="string">
            <text:p text:style-name="Standard"><text:span text:style-name="T12">Supervortex analog</text:span></text:p>
          </table:table-cell>
          <table:table-cell table:style-name="Table1.A1" office:value-type="string">
            <text:p text:style-name="Standard"><text:span text:style-name="T12">Physical role</text:span></text:p>
          </table:table-cell>
        </table:table-row>
        <table:table-row table:style-name="Table1.1">
          <table:table-cell table:style-name="Table1.A2" office:value-type="string">
            <text:p text:style-name="Standard"><text:span text:style-name="T13">Quadratic (exchange)</text:span></text:p>
          </table:table-cell>
          <table:table-cell table:style-name="Table1.B2" office:value-type="string">
            <text:p text:style-name="Standard"><text:span text:style-name="T13">κ(t) = A/(T−t) kinetic energy</text:span></text:p>
          </table:table-cell>
          <table:table-cell table:style-name="Table1.C2" office:value-type="string">
            <text:p text:style-name="Standard"><text:span text:style-name="T13">Energy cost of configuration</text:span></text:p>
          </table:table-cell>
        </table:table-row>
        <table:table-row table:style-name="Table1.1">
          <table:table-cell table:style-name="Table1.A3" office:value-type="string">
            <text:p text:style-name="Standard"><text:span text:style-name="T13">Quartic (stabilizing)</text:span></text:p>
          </table:table-cell>
          <table:table-cell table:style-name="Table1.B3" office:value-type="string">
            <text:p text:style-name="Standard"><text:span text:style-name="T13">N cage tubes: mutual repulsion</text:span></text:p>
          </table:table-cell>
          <table:table-cell table:style-name="Table1.C3" office:value-type="string">
            <text:p text:style-name="Standard"><text:span text:style-name="T13">Prevents collapse to a point</text:span></text:p>
          </table:table-cell>
        </table:table-row>
        <table:table-row table:style-name="Table1.1">
          <table:table-cell table:style-name="Table1.A4" office:value-type="string">
            <text:p text:style-name="Standard"><text:span text:style-name="T13">Mass (pinning)</text:span></text:p>
          </table:table-cell>
          <table:table-cell table:style-name="Table1.B4" office:value-type="string">
            <text:p text:style-name="Standard"><text:span text:style-name="T13">Helicity conservation on ∂V</text:span></text:p>
          </table:table-cell>
          <table:table-cell table:style-name="Table1.C4" office:value-type="string">
            <text:p text:style-name="Standard"><text:span text:style-name="T13">Pins boundary condition</text:span></text:p>
          </table:table-cell>
        </table:table-row>
        <table:table-row table:style-name="Table1.1">
          <table:table-cell table:style-name="Table1.A5" office:value-type="string">
            <text:p text:style-name="Standard"><text:span text:style-name="T13">Charge Q (π₃ winding)</text:span></text:p>
          </table:table-cell>
          <table:table-cell table:style-name="Table1.B5" office:value-type="string">
            <text:p text:style-name="Standard"><text:span text:style-name="T13">Helicity H (linking number)</text:span></text:p>
          </table:table-cell>
          <table:table-cell table:style-name="Table1.C5" office:value-type="string">
            <text:p text:style-name="Standard"><text:span text:style-name="T13">Integer topological invariant</text:span></text:p>
          </table:table-cell>
        </table:table-row>
      </table:table>
      <text:p text:style-name="P12"/>
      <text:p text:style-name="P9"><text:span text:style-name="T8">The mapping is structural, not analogical: each Skyrme mechanism has a concrete fluid-dynamical realization in the cage geometry.</text:span></text:p>
      <text:p text:style-name="Standard"/>
      <text:h text:style-name="P8" text:outline-level="1"><text:span text:style-name="T7">4. The Hopf Fibration Bridge: Q = H</text:span></text:h>
      <text:h text:style-name="P10" text:outline-level="2"><text:span text:style-name="T9">4.1 The Dictionary</text:span></text:h>
      <text:p text:style-name="P9"><text:span text:style-name="T8">We define the unit vorticity direction field:</text:span></text:p>
      <text:p text:style-name="P11"><text:span text:style-name="T11">ω̂(r) = ω(r) / |ω(r)| <text:s/>: <text:s/>ℝ³ → S²</text:span></text:p>
      <text:p text:style-name="P9"><text:span text:style-name="T8">This replaces the Skyrme spin field n̂(r): ℝ² → S². Both are unit vector fields on the 2-sphere.</text:span></text:p>
      <text:h text:style-name="P10" text:outline-level="2"><text:span text:style-name="T9">4.2 From Wrapping to Linking</text:span></text:h>
      <text:p text:style-name="P9"><text:span text:style-name="T8">The skyrmion charge Q counts wrappings of the direction field around S² on a cross-section:</text:span></text:p>
      <text:p text:style-name="P11"><text:span text:style-name="T11">Q = (1/4π) ∫ ω̂ · (∂ₓω̂ × ∂ᵧω̂) d²r</text:span></text:p>
      <text:p text:style-name="P9"><text:span text:style-name="T8">The fluid helicity H counts linking of vortex lines in a volume:</text:span></text:p>
      <text:p text:style-name="P11"><text:span text:style-name="T11">H = ∫ u · ω dV</text:span></text:p>
      <text:p text:style-name="P9"><text:span text:style-name="T8">The Hopf fibration (Hopf, 1931) converts 2D wrapping into 3D linking via the map S³ → S², where every pair of fibers is linked with linking number 1. Arnold (1974) proved that helicity is the asymptotic Hopf invariant, establishing the rigorous connection between wrapping and linking.</text:span></text:p>
      <text:h text:style-name="P10" text:outline-level="2"><text:span text:style-name="T9">4.3 Application to the Cage</text:span></text:h>
      <text:p text:style-name="P9"><text:span text:style-name="T8">The Supervortex cage geometry makes the Hopf bridge concrete:</text:span></text:p>
      <text:list text:style-name="WWNum2">
        <text:list-item text:start-value="1">
          <text:p text:style-name="P13"><text:span text:style-name="T8">All N cage tubes are closed rings. Linking numbers are well-defined.</text:span></text:p>
        </text:list-item>
        <text:list-item>
          <text:p text:style-name="P13"><text:span text:style-name="T8">Each cage tube encircles the central tube exactly once: Link(i, C) = 1.</text:span></text:p>
        </text:list-item>
        <text:list-item>
          <text:p text:style-name="P13"><text:span text:style-name="T8">Cage tubes do not link each other (they are coplanar).</text:span></text:p>
        </text:list-item>
      </text:list>
      <text:p text:style-name="P9"><text:span text:style-name="T8">By Moffatt’s theorem (Moffatt, 1969), the helicity for linked tubes with circulations κᵢ is:</text:span></text:p>
      <text:p text:style-name="P11"><text:span text:style-name="T11">H = Σ 2 · Link(i,j) · κᵢ · κⱼ = 2Nκ_t · A/(T−t)</text:span></text:p>
      <text:p text:style-name="P9"><text:span text:style-name="T8">The 2D skyrmion charge on any cross-section is Q = N (one wrapping per cage tube). Both Q and H count the same N cage tubes. The Hopf fibration is the mathematical object that converts wrappings to linkings; Moffatt’s theorem converts linkings to helicity.</text:span></text:p>
      <text:p text:style-name="P9"><text:span text:style-name="T10">Result: </text:span><text:span text:style-name="T8">Q and H are the same topological information expressed in different dimensions.</text:span></text:p>
      <text:p text:style-name="Standard"/>
      <text:h text:style-name="P8" text:outline-level="1"><text:span text:style-name="T7">5. The Viscous Subtlety and Its Resolution</text:span></text:h>
      <text:p text:style-name="P9"><text:span text:style-name="T8">Moffatt’s theorem guarantees helicity conservation in ideal (Euler) flow. The Navier–Stokes equations include viscosity ν, which introduces helicity dissipation:</text:span></text:p>
      <text:p text:style-name="P11"><text:span text:style-name="T11">dH/dt = −2ν ∫ ω · (∇ × ω) dV</text:span></text:p>
      <text:h text:style-name="P10" text:outline-level="2"><text:span text:style-name="T9">5.1 Magnitude vs Topology</text:span></text:h>
      <text:p text:style-name="P9"><text:span text:style-name="T10">Viscosity can: </text:span><text:span text:style-name="T8">Smoothly decrease the magnitude of helicity. The circulations weaken gradually over time. This is a continuous process.</text:span></text:p>
      <text:p text:style-name="P9"><text:span text:style-name="T10">Viscosity cannot: </text:span><text:span text:style-name="T8">Change the linking number. Linking number is an integer that can only change through reconnection — a topology-changing event where tubes physically touch, break, and rejoin.</text:span></text:p>
      <text:p text:style-name="P9"><text:span text:style-name="T8">Viscosity can turn down the volume. It cannot change the song.</text:span></text:p>
      <text:h text:style-name="P10" text:outline-level="2"><text:span text:style-name="T9">5.2 Reconnection Is Suppressed</text:span></text:h>
      <text:p text:style-name="P9"><text:span text:style-name="T8">As established in §2.2, tubes thin faster than they approach (δ ~ (T−t)^{0.5} vs gap ~ (T−t)^{0.3}). Physical contact never occurs. The discrete linking topology (N tubes, each with linking number 1) is preserved even in viscous flow.</text:span></text:p>
      <text:p text:style-name="P9"><text:span text:style-name="T10">The Skyrmion correspondence holds for Navier–Stokes, not just Euler.</text:span></text:p>
      <text:p text:style-name="Standard"/>
      <text:h text:style-name="P8" text:outline-level="1"><text:span text:style-name="T7">6. Function Space Verification</text:span></text:h>
      <text:p text:style-name="P9"><text:span text:style-name="T8">The Skyrme stability proofs rely on three mathematical properties. Each must hold in the fluid setting for the proofs to transfer.</text:span></text:p>
      <text:h text:style-name="P10" text:outline-level="2"><text:span text:style-name="T9">6.1 Finite Energy Implies Sobolev H¹ Regularity</text:span></text:h>
      <text:p text:style-name="P9"><text:span text:style-name="T10">Skyrme: </text:span><text:span text:style-name="T8">Finite Skyrme energy implies U ∈ H¹(ℝ³; SU(2)).</text:span></text:p>
      <text:p text:style-name="P9"><text:span text:style-name="T10">Fluid: </text:span><text:span text:style-name="T8">Finite kinetic energy implies u ∈ H¹(Ω). This is standard Navier–Stokes theory.</text:span></text:p>
      <text:h text:style-name="P10" text:outline-level="2"><text:span text:style-name="T9">6.2 Topological Charge Is Continuous in H¹</text:span></text:h>
      <text:p text:style-name="P9"><text:span text:style-name="T10">Skyrme: </text:span><text:span text:style-name="T8">The winding number Q is continuous in the H¹ topology. Since Q ∈ ℤ and is continuous, it is constant under continuous deformation.</text:span></text:p>
      <text:p text:style-name="P9"><text:span text:style-name="T10">Fluid: </text:span><text:span text:style-name="T8">Helicity H = ∫u·ω dV is a quadratic functional, hence continuous in H¹ by Cauchy–Schwarz. The linking number is integer-valued. Integer + continuous = constant.</text:span></text:p>
      <text:h text:style-name="P10" text:outline-level="2"><text:span text:style-name="T9">6.3 Compactness</text:span></text:h>
      <text:p text:style-name="P9"><text:span text:style-name="T10">Both: </text:span><text:span text:style-name="T8">The Rellich–Kondrachov theorem gives compact embedding H¹(Ω) ↪ L²(Ω) on bounded domains. This is the same theorem in both settings, independent of the target manifold.</text:span></text:p>
      <text:h text:style-name="P10" text:outline-level="2"><text:span text:style-name="T9">6.4 Target Manifold</text:span></text:h>
      <text:p text:style-name="P9"><text:span text:style-name="T8">The Skyrme field maps to SU(2) ≅ S³. The vorticity direction maps to S². Both have π₃ = ℤ (the integers). For S³ this is the identity; for S² this is the Hopf invariant (Hopf, 1931). The stability proofs require only π₃ = ℤ and the properties above. The target manifold difference does not affect the argument.</text:span></text:p>
      <text:p text:style-name="P9"><text:span text:style-name="T10">All checks pass.</text:span><text:span text:style-name="T8"> The Skyrme stability proofs survive translation to fluid variables.</text:span></text:p>
      <text:p text:style-name="Standard"/>
      <text:h text:style-name="P8" text:outline-level="1"><text:span text:style-name="T7">7. The Energy Landscape</text:span></text:h>
      <text:h text:style-name="P10" text:outline-level="2"><text:span text:style-name="T9">7.1 Derrick Stabilization</text:span></text:h>
      <text:p text:style-name="P9"><text:span text:style-name="T8">Derrick’s theorem (Derrick, 1964) states that without a quartic term, no stable localized solution exists in 3D — any soliton can lower its energy by shrinking to a point. The Supervortex resolves this identically to the Skyrme model: the cage tube repulsion (quartic analog) prevents collapse, creating an energy minimum at finite radius R*.</text:span></text:p>
      <text:p text:style-name="P9"><text:span text:style-name="T8">The cage energy has three competing terms:</text:span></text:p>
      <text:p text:style-name="P11"><text:span text:style-name="T11">E(R) = E_attract(R) + E_repel(R) + E_self(R)</text:span></text:p>
      <text:p text:style-name="P9"><text:span text:style-name="T8">where E_attract ~ −ln(R/δ) drives collapse, E_repel ~ ln(d_nn/δ) resists collapse, and E_self ~ R·ln(R/δ) resists expansion. The minimum exists when N exceeds a critical threshold, which is precisely the N_crit scaling law from §1.3. The Derrick stabilization threshold provides a theoretical explanation for N_crit.</text:span></text:p>
      <text:h text:style-name="P10" text:outline-level="2"><text:span text:style-name="T9">7.2 Arnold Energy–Helicity Bound</text:span></text:h>
      <text:p text:style-name="P9"><text:span text:style-name="T8">Arnold (1974) proved that for divergence-free fields in a bounded domain:</text:span></text:p>
      <text:p text:style-name="P11"><text:span text:style-name="T11">E ≥ (λ₁/2) · |H|</text:span></text:p>
      <text:p text:style-name="P9"><text:span text:style-name="T8">where λ₁ is the smallest eigenvalue of the curl operator. For the cage with helicity H = 2Nκ_t A/(T−t):</text:span></text:p>
      <text:p text:style-name="P11"><text:span text:style-name="T11">E ≥ λ₁ N κ_t A / (T−t) → ∞ <text:s/>as <text:s/>t → T</text:span></text:p>
      <text:p text:style-name="P9"><text:span text:style-name="T8">Topology forces energy. Energy forces vorticity. </text:span><text:span text:style-name="T10">A flow with nonzero linking must carry energy, and that energy must diverge if the linking strength diverges.</text:span></text:p>
      <text:p text:style-name="Standard"/>
      <text:h text:style-name="P8" text:outline-level="1"><text:span text:style-name="T7">8. The Integral Reduction</text:span></text:h>
      <text:h text:style-name="P10" text:outline-level="2"><text:span text:style-name="T9">8.1 Topology Eliminates the Shape Variable</text:span></text:h>
      <text:p text:style-name="P9"><text:span text:style-name="T8">Studying vorticity evolution across scales requires tracking two unknowns: the shape of the vorticity structure and the scale at which it is observed. The Skyrmion correspondence eliminates the shape variable. The linking number N is an integer that cannot change continuously, so the cage structure is identical at every scale. If the topological invariant is the same at the smallest and largest active scales, it must be the same at every scale in between — a discrete quantity cannot change continuously between the endpoints.</text:span></text:p>
      <text:h text:style-name="P10" text:outline-level="2"><text:span text:style-name="T9">8.2 One Integral</text:span></text:h>
      <text:p text:style-name="P9"><text:span text:style-name="T8">With the shape variable eliminated, the Beale–Kato–Majda criterion (Beale, Kato, and Majda, 1984) reduces to:</text:span></text:p>
      <text:p text:style-name="P11"><text:span text:style-name="T11">I(T) = ∫₀ᵀ ‖ω_cage‖_∞ dt = ∫₀ᵀ C/(T−t)² dt</text:span></text:p>
      <text:p text:style-name="P9"><text:span text:style-name="T8">where C = C(N, A, R₀) is determined by the cage parameters. This integral diverges unless something cuts it off before t = T. The question of Navier–Stokes regularity for Supervortex-class initial data reduces to whether this integral is cut off.</text:span></text:p>
      <text:p text:style-name="Standard"/>
      <text:h text:style-name="P8" text:outline-level="1"><text:span text:style-name="T7">9. The Binary Outcome</text:span></text:h>
      <text:p text:style-name="P9"><text:span text:style-name="T8">The cage has exactly two possible fates:</text:span></text:p>
      <text:h text:style-name="P10" text:outline-level="2"><text:span text:style-name="T9">9.1 Outcome A — Singularity</text:span></text:h>
      <text:p text:style-name="P9"><text:span text:style-name="T8">The cage survives to t = T. The BKM integral diverges. Vorticity reaches infinity in finite time. The Navier–Stokes equations develop a genuine singularity from smooth initial data. Global regularity fails.</text:span></text:p>
      <text:p text:style-name="P9"><text:span text:style-name="T10">Supporting evidence: </text:span><text:span text:style-name="T8">Self-consistency with no free parameters. Perturbative stability. Reconnection suppression. Pressure compatibility. Topological protection via Skyrmion correspondence. Arnold energy bound forcing energy divergence.</text:span></text:p>
      <text:h text:style-name="P10" text:outline-level="2"><text:span text:style-name="T9">9.2 Outcome B — Regularity</text:span></text:h>
      <text:p text:style-name="P9"><text:span text:style-name="T8">Viscous diffusion ν/δ² grows without bound as tubes thin (δ → 0), and at some t* &lt; T the viscous smoothing rate overtakes the stretching rate. The cage is arrested. The BKM integral is cut off and remains finite. No singularity.</text:span></text:p>
      <text:p text:style-name="P9"><text:span text:style-name="T10">Supporting evidence: </text:span><text:span text:style-name="T8">The perturbative reconnection analysis may break down close to T. Viscosity ν/δ² ~ (T−t)^{−1} grows without bound. The Sobolev mode decomposition has not been completed non-perturbatively.</text:span></text:p>
      <text:p text:style-name="P9"><text:span text:style-name="T14">Remark: </text:span><text:span text:style-name="T15">Outcome B would itself be a significant result, identifying viscosity as the specific physical mechanism that prevents singularity formation — implying that the inviscid Euler equations may blow up while the viscous Navier–Stokes equations remain regular.</text:span></text:p>
      <text:h text:style-name="P10" text:outline-level="2"><text:span text:style-name="T9">9.3 No Third Option</text:span></text:h>
      <text:p text:style-name="P9"><text:span text:style-name="T8">A cage that neither blows up nor breaks would persist indefinitely in a viscous fluid. This is impossible: viscosity continuously dissipates energy, so any structure that does not actively concentrate vorticity must decay. The cage must race to infinity or lose coherence. The outcome is strictly binary.</text:span></text:p>
      <text:p text:style-name="Standard"/>
      <text:h text:style-name="P8" text:outline-level="1"><text:span text:style-name="T7">10. Discussion</text:span></text:h>
      <text:h text:style-name="P10" text:outline-level="2"><text:span text:style-name="T9">10.1 Summary of Results</text:span></text:h>
      <text:p text:style-name="P9"><text:span text:style-name="T8">We have constructed a specific, fully determined blowup candidate for 3D Navier–Stokes and established its topological stability via four theorem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12">Theorem</text:span></text:p>
          </table:table-cell>
          <table:table-cell table:style-name="Table2.A1" office:value-type="string">
            <text:p text:style-name="Standard"><text:span text:style-name="T12">Statement</text:span></text:p>
          </table:table-cell>
          <table:table-cell table:style-name="Table2.A1" office:value-type="string">
            <text:p text:style-name="Standard"><text:span text:style-name="T12">Basis</text:span></text:p>
          </table:table-cell>
        </table:table-row>
        <table:table-row table:style-name="Table2.1">
          <table:table-cell table:style-name="Table2.A2" office:value-type="string">
            <text:p text:style-name="Standard"><text:span text:style-name="T13">1. Q = H</text:span></text:p>
          </table:table-cell>
          <table:table-cell table:style-name="Table2.B2" office:value-type="string">
            <text:p text:style-name="Standard"><text:span text:style-name="T13">Skyrmion charge equals fluid helicity for cage geometry</text:span></text:p>
          </table:table-cell>
          <table:table-cell table:style-name="Table2.C2" office:value-type="string">
            <text:p text:style-name="Standard"><text:span text:style-name="T13">Hopf (1931), Moffatt (1969)</text:span></text:p>
          </table:table-cell>
        </table:table-row>
        <table:table-row table:style-name="Table2.1">
          <table:table-cell table:style-name="Table2.A3" office:value-type="string">
            <text:p text:style-name="Standard"><text:span text:style-name="T13">2. Derrick stabilization</text:span></text:p>
          </table:table-cell>
          <table:table-cell table:style-name="Table2.B3" office:value-type="string">
            <text:p text:style-name="Standard"><text:span text:style-name="T13">Cage energy has minimum at finite R*</text:span></text:p>
          </table:table-cell>
          <table:table-cell table:style-name="Table2.C3" office:value-type="string">
            <text:p text:style-name="Standard"><text:span text:style-name="T13">Derrick (1964), Skyrme (1961)</text:span></text:p>
          </table:table-cell>
        </table:table-row>
        <table:table-row table:style-name="Table2.1">
          <table:table-cell table:style-name="Table2.A4" office:value-type="string">
            <text:p text:style-name="Standard"><text:span text:style-name="T13">3. Energy bound</text:span></text:p>
          </table:table-cell>
          <table:table-cell table:style-name="Table2.B4" office:value-type="string">
            <text:p text:style-name="Standard"><text:span text:style-name="T13">E ≥ (λ₁/2)|H| for the cage</text:span></text:p>
          </table:table-cell>
          <table:table-cell table:style-name="Table2.C4" office:value-type="string">
            <text:p text:style-name="Standard"><text:span text:style-name="T13">Arnold (1974)</text:span></text:p>
          </table:table-cell>
        </table:table-row>
        <table:table-row table:style-name="Table2.1">
          <table:table-cell table:style-name="Table2.A5" office:value-type="string">
            <text:p text:style-name="Standard"><text:span text:style-name="T13">4. Function spaces</text:span></text:p>
          </table:table-cell>
          <table:table-cell table:style-name="Table2.B5" office:value-type="string">
            <text:p text:style-name="Standard"><text:span text:style-name="T13">H¹ regularity, charge continuity, compactness preserved</text:span></text:p>
          </table:table-cell>
          <table:table-cell table:style-name="Table2.C5" office:value-type="string">
            <text:p text:style-name="Standard"><text:span text:style-name="T13">Rellich–Kondrachov</text:span></text:p>
          </table:table-cell>
        </table:table-row>
      </table:table>
      <text:p text:style-name="P12"/>
      <text:h text:style-name="P10" text:outline-level="2"><text:span text:style-name="T9">10.2 Honest Assessment</text:span></text:h>
      <text:p text:style-name="P9"><text:span text:style-name="T8">The construction is self-consistent, topologically protected, and backed by established mathematics. The four theorems of the Skyrmion correspondence are individually supported by well-known results in topology, functional analysis, and fluid dynamics.</text:span></text:p>
      <text:p text:style-name="P9"><text:span text:style-name="T8">However, several caveats must be stated clearly:</text:span></text:p>
      <text:list text:continue-numbering="true" text:style-name="WWNum2">
        <text:list-item>
          <text:p text:style-name="P13"><text:span text:style-name="T8">The reconnection suppression analysis (§2.2) is perturbative. Very close to T, the flow becomes strongly nonlinear and the perturbative exponents may not hold.</text:span></text:p>
        </text:list-item>
        <text:list-item>
          <text:p text:style-name="P13"><text:span text:style-name="T8">The function space verification (§6) establishes that the relevant properties transfer, but a fully rigorous proof would require explicit construction of the isomorphism between Skyrme and NS configuration spaces, not just verification of shared properties.</text:span></text:p>
        </text:list-item>
        <text:list-item>
          <text:p text:style-name="P13"><text:span text:style-name="T8">The binary outcome (§9) is a framework, not a determination. We do not resolve which outcome occurs. The quantitative race between blowup and viscous arrest remains open.</text:span></text:p>
        </text:list-item>
        <text:list-item>
          <text:p text:style-name="P13"><text:span text:style-name="T8">No high-resolution numerical simulation of the full 3D Navier–Stokes equations with Supervortex initial data has been performed. Such a simulation would provide crucial empirical evidence.</text:span></text:p>
        </text:list-item>
      </text:list>
      <text:h text:style-name="P10" text:outline-level="2"><text:span text:style-name="T9">10.3 Relation to Existing Work</text:span></text:h>
      <text:p text:style-name="P9"><text:span text:style-name="T8">The Supervortex construction relates to several threads in the existing literature. The use of vortex filament methods and Biot–Savart dynamics follows a tradition going back to Helmholtz. The identification of helicity as a topological invariant is due to Moffatt (1969) and Arnold (1974). The Skyrme model correspondence is, to our knowledge, novel — the identification of a fluid vortex configuration as a skyrmion with inherited topological stability has not been previously proposed.</text:span></text:p>
      <text:p text:style-name="P9"><text:soft-page-break/><text:span text:style-name="T8">The S² holographic screen structure that emerges from the cage geometry was identified independently in the Observer-Pixel Hypothesis of Mueller, who arrived at the same geometric framework from quantum gravity axioms. This convergence from opposite directions — fluid dynamics and fundamental physics — provides supporting evidence that the S² screen structure is a fundamental geometric feature, not an artifact of either approach.</text:span></text:p>
      <text:h text:style-name="P10" text:outline-level="2"><text:span text:style-name="T9">10.4 What Remains</text:span></text:h>
      <text:p text:style-name="P9"><text:span text:style-name="T8">The decisive remaining question is quantitative: does the viscous arrest timescale t* reach T before the blowup completes? This can be addressed by:</text:span></text:p>
      <text:list text:continue-numbering="true" text:style-name="WWNum2">
        <text:list-item>
          <text:p text:style-name="P13"><text:span text:style-name="T8">Direct numerical simulation of the 3D NS equations with cage-shaped initial data at high resolution, tracking whether the flow follows the predicted scaling laws.</text:span></text:p>
        </text:list-item>
        <text:list-item>
          <text:p text:style-name="P13"><text:span text:style-name="T8">Rigorous estimation of the viscous arrest time t* as a function of cage parameters (N, A, R₀, ν).</text:span></text:p>
        </text:list-item>
        <text:list-item>
          <text:p text:style-name="P13"><text:span text:style-name="T8">Non-perturbative extension of the reconnection analysis to the strongly nonlinear regime near T.</text:span></text:p>
        </text:list-item>
      </text:list>
      <text:p text:style-name="P9"><text:span text:style-name="T8">The topological framework presented here reduces the Millennium Problem (for Supervortex-class data) from an open-ended PDE question to a specific, well-posed quantitative race. We believe this reduction represents meaningful progress regardless of which outcome ultimately prevails.</text:span></text:p>
      <text:p text:style-name="Standard"/>
      <text:h text:style-name="P8" text:outline-level="1"><text:span text:style-name="T7">References</text:span></text:h>
      <text:p text:style-name="P9"><text:span text:style-name="T8">[1] Arnold, V.I. (1966). Sur la géométrie différentielle des groupes de Lie de dimension infinie et ses applications à l’hydrodynamique des fluides parfaits. Ann. Inst. Fourier 16, 319–361.</text:span></text:p>
      <text:p text:style-name="P9"><text:span text:style-name="T8">[2] Arnold, V.I. (1974). The asymptotic Hopf invariant and its applications. Sel. Math. Sov. 5, 327–345.</text:span></text:p>
      <text:p text:style-name="P9"><text:span text:style-name="T8">[3] Beale, J.T., Kato, T., and Majda, A. (1984). Remarks on the breakdown of smooth solutions for the 3-D Euler equations. Comm. Math. Phys. 94, 61–66.</text:span></text:p>
      <text:p text:style-name="P9"><text:span text:style-name="T8">[4] Derrick, G.H. (1964). Comments on nonlinear wave equations as models for elementary particles. J. Math. Phys. 5, 1252–1254.</text:span></text:p>
      <text:p text:style-name="P9"><text:span text:style-name="T8">[5] Hopf, H. (1931). Über die Abbildungen der dreidimensionalen Sphäre auf die Kugelfläche. Math. Ann. 104, 637–665.</text:span></text:p>
      <text:p text:style-name="P9"><text:span text:style-name="T8">[6] Moffatt, H.K. (1969). The degree of knottedness of tangled vortex lines. J. Fluid Mech. 35, 117–129.</text:span></text:p>
      <text:p text:style-name="P9"><text:span text:style-name="T8">[7] Moffatt, H.K. (2014). Helicity and singular structures in fluid dynamics. Proc. Natl. Acad. Sci. USA 111, 3663–3670.</text:span></text:p>
      <text:p text:style-name="P9"><text:span text:style-name="T8">[8] Mueller, B. Observer-Pixel Hypothesis. (Private communication and preprint.)</text:span></text:p>
      <text:p text:style-name="P9"><text:span text:style-name="T8">[9] Ricca, R.L. and Moffatt, H.K. (1992). The helicity of a knotted vortex filament. In: Topological Aspects of the Dynamics of Fluids and Plasmas, 225–236. Kluwer.</text:span></text:p>
      <text:p text:style-name="P9"><text:span text:style-name="T8">[10] Skyrme, T.H.R. (1961). A non-linear field theory. Proc. R. Soc. Lond. A 260, 127–138.</text:span></text:p>
      <text:p text:style-name="P9"><text:span text:style-name="T8">[11] Skyrme, T.H.R. (1962). A unified field theory of mesons and baryons. Nucl. Phys. 31, 556–569.</text:span></text:p>
      <text:p text:style-name="P14"/>
      <text:p text:style-name="P15"/>
      <text:p text:style-name="P16"><text:span text:style-name="T16">“The cage is the same shape at every scale.</text:span></text:p>
      <text:p text:style-name="P16"><text:span text:style-name="T16">If it works at the smallest scale and the biggest scale,</text:span></text:p>
      <text:p text:style-name="P16"><text:span text:style-name="T16">it works at every scale in between.</text:span></text:p>
      <text:p text:style-name="P17"><text:span text:style-name="T16">One shape. One integral. One answ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2pt" fo:language="fr" fo:country="FR" style:letter-kerning="false" style:font-name-asian="Georgia1" style:font-size-asian="12pt" style:language-asian="zh" style:country-asian="CN" style:font-name-complex="Georgia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Georgia" fo:font-size="12pt" fo:language="fr" fo:country="FR" style:letter-kerning="false" style:font-name-asian="Georgia1" style:font-size-asian="12pt" style:language-asian="zh" style:country-asian="CN" style:font-name-complex="Georgi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353cm" style:contextual-spacing="false"/>
      <style:text-properties fo:color="#1a1a2e"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635cm" fo:margin-bottom="0.247cm" style:contextual-spacing="false"/>
      <style:text-properties fo:color="#16213e"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999999" loext:opacity="100%" fo:font-family="Arial" style:font-family-generic="roman" style:font-pitch="variable" fo:font-size="9pt" style:font-name-asian="Arial2" style:font-size-asian="9pt" style:font-name-complex="Arial2" style:font-size-complex="9pt"/>
    </style:style>
    <style:style style:name="MT2" style:family="text">
      <style:text-properties style:font-name="Georgia" fo:font-size="12pt" fo:font-style="italic" style:font-name-asian="Georgia1" style:font-size-asian="12pt" style:font-style-asian="italic" style:font-name-complex="Georgia1" style:font-size-complex="12pt" style:font-style-complex="italic"/>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Supervortex: A Topological Approach to Navier–Stokes Regularity</text:span></text:p>
      </style:header>
      <style:footer>
        <text:p text:style-name="MP1"><text:span text:style-name="MT1">Page </text:span><text:span text:style-name="MT2"><text:page-number text:select-page="current">14</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17T06:10:23.188000000</meta:creation-date>
    <dc:date>2026-05-02T15:49:38.961874600</dc:date>
    <meta:editing-duration>PT3M16S</meta:editing-duration>
    <meta:document-statistic meta:table-count="2" meta:image-count="0" meta:object-count="0" meta:page-count="14" meta:paragraph-count="177" meta:word-count="2948" meta:character-count="18410" meta:non-whitespace-character-count="15729"/>
    <meta:generator>LibreOffice/26.2.3.2$Windows_X86_64 LibreOffice_project/70e089b17412e4cb7773e41413306b17a2328c34</meta:generator>
  </office:meta>
</office:document-meta>
</file>